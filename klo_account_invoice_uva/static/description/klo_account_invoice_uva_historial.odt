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Titulo" style:family="paragraph" style:display-name="Titulo">
      <style:text-properties fo:font-size="20pt" fo:font-weight="bold" fo:color="#1F4E79"/>
      <style:paragraph-properties fo:margin-bottom="0.4cm" fo:margin-top="0.6cm" fo:break-before="auto"/>
    </style:style>
    <style:style style:name="H1" style:family="paragraph" style:display-name="H1">
      <style:text-properties fo:font-size="15pt" fo:font-weight="bold" fo:color="#2E74B5"/>
      <style:paragraph-properties fo:margin-bottom="0.3cm" fo:margin-top="0.5cm"/>
    </style:style>
    <style:style style:name="H2" style:family="paragraph" style:display-name="H2">
      <style:text-properties fo:font-size="13pt" fo:font-weight="bold" fo:color="#2E74B5"/>
      <style:paragraph-properties fo:margin-bottom="0.2cm" fo:margin-top="0.4cm"/>
    </style:style>
    <style:style style:name="H3" style:family="paragraph" style:display-name="H3">
      <style:text-properties fo:font-size="11pt" fo:font-weight="bold" fo:color="#404040"/>
      <style:paragraph-properties fo:margin-bottom="0.15cm" fo:margin-top="0.3cm"/>
    </style:style>
    <style:style style:name="Normal" style:family="paragraph" style:display-name="Normal">
      <style:text-properties fo:font-size="11pt" fo:color="#000000"/>
      <style:paragraph-properties fo:margin-bottom="0.15cm" fo:margin-top="0.0cm"/>
    </style:style>
    <style:style style:name="Codigo" style:family="paragraph" style:display-name="Codigo">
      <style:text-properties fo:font-size="9pt" fo:font-family="Courier New" fo:color="#1A1A1A" fo:background-color="#F2F2F2"/>
      <style:paragraph-properties fo:margin-bottom="0.1cm" fo:margin-top="0.1cm" fo:margin-left="0.8cm" fo:margin-right="0.4cm" fo:background-color="#F2F2F2"/>
    </style:style>
    <style:style style:name="Peticion" style:family="paragraph" style:display-name="Peticion">
      <style:text-properties fo:font-size="11pt" fo:color="#1F3864" fo:font-style="italic"/>
      <style:paragraph-properties fo:margin-bottom="0.1cm" fo:margin-top="0.1cm" fo:margin-left="0.5cm" fo:background-color="#DEEAF1"/>
    </style:style>
    <style:style style:name="Respuesta" style:family="paragraph" style:display-name="Respuesta">
      <style:text-properties fo:font-size="11pt" fo:color="#1E4620"/>
      <style:paragraph-properties fo:margin-bottom="0.1cm" fo:margin-top="0.1cm" fo:margin-left="0.5cm" fo:background-color="#E2EFDA"/>
    </style:style>
    <style:style style:name="Error" style:family="paragraph" style:display-name="Error">
      <style:text-properties fo:font-size="11pt" fo:color="#922B21" fo:font-weight="bold"/>
      <style:paragraph-properties fo:margin-bottom="0.1cm" fo:margin-top="0.1cm" fo:margin-left="0.5cm" fo:background-color="#FDEDEC"/>
    </style:style>
    <style:style style:name="Separador" style:family="paragraph" style:display-name="Separador">
      <style:text-properties fo:font-size="6pt" fo:color="#CCCCCC"/>
      <style:paragraph-properties fo:margin-bottom="0.2cm" fo:margin-top="0.2cm" fo:border-bottom="0.05cm solid #AAAAAA"/>
    </style:style>
  </office:automatic-styles>
  <office:body>
    <office:text>
      <text:p text:style-name="Titulo">Historial de desarrollo: módulo klo_account_invoice_uva</text:p>
      <text:p text:style-name="Normal">Fecha de referencia: 19 de marzo de 2026  |  Repositorio GitHub: klosll</text:p>
      <text:p text:style-name="Normal">Ruta del módulo: /opt/odoo16_desarrollo/odoo/extra-addons/extra/klo_account_invoice_uva</text:p>
      <text:p text:style-name="Normal">Odoo versión: 16.0  |  Licencia: LGPL-3</text:p>
      <text:p text:style-name="Separador"> </text:p>
      <text:p text:style-name="H1">1. CONTEXTO INICIAL DEL PROYECTO</text:p>
      <text:p text:style-name="Normal">El desarrollador trabaja con Odoo 16 en un entorno Linux. Los módulos personalizados se ubican en /opt/odoo16_desarrollo/odoo/extra-addons/extra/. La cuenta de GitHub es klosll. Los comentarios de código deben estar siempre en español.</text:p>
      <text:p text:style-name="Normal"> </text:p>
      <text:p text:style-name="H1">2. HISTORIAL DE PETICIONES Y RESPUESTAS</text:p>
      <text:p text:style-name="Separador"> </text:p>
      <text:p text:style-name="H2">PETICIÓN 1 — Crear el módulo base con campos en account.move.line</text:p>
      <text:p text:style-name="Separador"> </text:p>
      <text:p text:style-name="Peticion">👤 USUARIO: Crear un nuevo módulo llamado klo_account_invoice_uva ubicado en /opt/odoo16_desarrollo/extra-addons/extra.</text:p>
      <text:p text:style-name="Peticion">👤 USUARIO: Heredar del modelo account.move.line para añadir los campos:</text:p>
      <text:p text:style-name="Peticion">👤 USUARIO:   • grado  → Tipo: Decimal</text:p>
      <text:p text:style-name="Peticion">👤 USUARIO:   • kilos  → Tipo: Decimal</text:p>
      <text:p text:style-name="Peticion">👤 USUARIO:   • precio_kilogrado  → Tipo: Decimal</text:p>
      <text:p text:style-name="Peticion">👤 USUARIO:   • kilogrados  → Tipo: Decimal</text:p>
      <text:p text:style-name="Normal"> </text:p>
      <text:p text:style-name="Respuesta">🤖 IA: Se creó la estructura completa del módulo con __manifest__.py, __init__.py, models/__init__.py y models/account_move_line.py.</text:p>
      <text:p text:style-name="Normal"> </text:p>
      <text:p text:style-name="H3">Fichero: models/account_move_line.py</text:p>
      <text:p text:style-name="Codigo">from odoo import models, fields, api</text:p>
      <text:p text:style-name="Codigo"> </text:p>
      <text:p text:style-name="Codigo">class AccountMoveLine(models.Model):</text:p>
      <text:p text:style-name="Codigo">    _inherit = 'account.move.line'</text:p>
      <text:p text:style-name="Codigo"> </text:p>
      <text:p text:style-name="Codigo">    grado = fields.Float(string='Grado', digits=(16, 2), default=0.0)</text:p>
      <text:p text:style-name="Codigo">    kilos = fields.Float(string='Kilos', digits=(16, 2), default=0.0)</text:p>
      <text:p text:style-name="Codigo">    precio_kilogrado = fields.Float(string='€/Kilogrado', digits=(16, 4), default=0.0)</text:p>
      <text:p text:style-name="Codigo">    kilogrados = fields.Float(string='Kilogrados', digits=(16, 2), default=0.0)</text:p>
      <text:p text:style-name="Codigo"> </text:p>
      <text:p text:style-name="Codigo">    @api.onchange('kilos', 'grado')</text:p>
      <text:p text:style-name="Codigo">    def _onchange_kilos_grado_uva(self):</text:p>
      <text:p text:style-name="Codigo">        """Recalcula kilogrados y el importe al cambiar kilos o grado."""</text:p>
      <text:p text:style-name="Codigo">        self.kilogrados = self.kilos * self.grado</text:p>
      <text:p text:style-name="Codigo">        self.price_unit = self.precio_kilogrado * self.kilogrados * 1000.0</text:p>
      <text:p text:style-name="Codigo"> </text:p>
      <text:p text:style-name="Codigo">    @api.onchange('precio_kilogrado', 'kilogrados')</text:p>
      <text:p text:style-name="Codigo">    def _onchange_importe_uva(self):</text:p>
      <text:p text:style-name="Codigo">        """Recalcula el importe (price_unit) al cambiar €/kilogrado o kilogrados.</text:p>
      <text:p text:style-name="Codigo">        Fórmula: Importe = €/kilogrado × Kilogrados × 1.000</text:p>
      <text:p text:style-name="Codigo">        """</text:p>
      <text:p text:style-name="Codigo">        self.price_unit = self.precio_kilogrado * self.kilogrados * 1000.0</text:p>
      <text:p text:style-name="Separador"> </text:p>
      <text:p text:style-name="H2">PETICIÓN 2 — Campo 'Es para uva' en el diario y nueva vista de factura</text:p>
      <text:p text:style-name="Separador"> </text:p>
      <text:p text:style-name="Peticion">👤 USUARIO: En el diario creado llamado 'Facturas de cliente uva' añadir un campo boolean llamado 'Es para uva'.</text:p>
      <text:p text:style-name="Peticion">👤 USUARIO: Si está marcado (True), al pulsar el botón action_create_new en la vista account.account_journal_dashboard_kanban_view, se creará una nueva factura con una vista llamada view_move_form_uva que hereda de account.view_move_form.</text:p>
      <text:p text:style-name="Peticion">👤 USUARIO: Cambios en las columnas de la lista Líneas de factura en view_move_form_uva:</text:p>
      <text:p text:style-name="Peticion">👤 USUARIO:   • 'Etiqueta'       → oculta por defecto</text:p>
      <text:p text:style-name="Peticion">👤 USUARIO:   • 'Cuenta'         → oculta por defecto</text:p>
      <text:p text:style-name="Peticion">👤 USUARIO:   • 'Cantidad'       → oculta por defecto</text:p>
      <text:p text:style-name="Peticion">👤 USUARIO:   • 'Grado'          → campo grado, visible</text:p>
      <text:p text:style-name="Peticion">👤 USUARIO:   • 'Kilos'          → campo kilos, visible</text:p>
      <text:p text:style-name="Peticion">👤 USUARIO:   • '€/kilogrado'    → campo precio_kilogrado, visible</text:p>
      <text:p text:style-name="Peticion">👤 USUARIO:   • 'Kilogrados'     → campo kilogrados, visible | Cálculo: Kilos × Grados</text:p>
      <text:p text:style-name="Peticion">👤 USUARIO:   • 'Importe'        → campo price_unit renombrado | Cálculo: €/kg × Kilogrados × 1.000</text:p>
      <text:p text:style-name="Peticion">👤 USUARIO:   • 'Impuestos'      → oculta por defecto</text:p>
      <text:p text:style-name="Normal"> </text:p>
      <text:p text:style-name="Respuesta">🤖 IA: Se crearon los ficheros models/account_journal.py y views/account_journal_views.xml para el campo es_para_uva. Se sobrescribió action_create_new para abrir view_move_form_uva.</text:p>
      <text:p text:style-name="Respuesta">🤖 IA: Se creó views/account_move_uva_views.xml con mode='primary' que hereda de account.view_move_form, modificando las columnas de invoice_line_ids con xpath.</text:p>
      <text:p text:style-name="Normal"> </text:p>
      <text:p text:style-name="H3">Fichero: models/account_journal.py</text:p>
      <text:p text:style-name="Codigo">from odoo import models, fields, _</text:p>
      <text:p text:style-name="Codigo"> </text:p>
      <text:p text:style-name="Codigo">class AccountJournal(models.Model):</text:p>
      <text:p text:style-name="Codigo">    _inherit = 'account.journal'</text:p>
      <text:p text:style-name="Codigo"> </text:p>
      <text:p text:style-name="Codigo">    es_para_uva = fields.Boolean(</text:p>
      <text:p text:style-name="Codigo">        string='Es para uva',</text:p>
      <text:p text:style-name="Codigo">        default=False,</text:p>
      <text:p text:style-name="Codigo">        help='Si está marcado, al crear una nueva factura desde el dashboard '</text:p>
      <text:p text:style-name="Codigo">             'se utilizará la vista especializada para facturas de uva.',</text:p>
      <text:p text:style-name="Codigo">    )</text:p>
      <text:p text:style-name="Codigo"> </text:p>
      <text:p text:style-name="Codigo">    def action_create_new(self):</text:p>
      <text:p text:style-name="Codigo">        """Sobrescribe la acción de creación de factura.</text:p>
      <text:p text:style-name="Codigo">        Si el diario está marcado como 'Es para uva', abre la vista</text:p>
      <text:p text:style-name="Codigo">        especializada view_move_form_uva en lugar de la estándar.</text:p>
      <text:p text:style-name="Codigo">        """</text:p>
      <text:p text:style-name="Codigo">        if self.es_para_uva:</text:p>
      <text:p text:style-name="Codigo">            return {</text:p>
      <text:p text:style-name="Codigo">                'name': _('Crear factura de uva'),</text:p>
      <text:p text:style-name="Codigo">                'type': 'ir.actions.act_window',</text:p>
      <text:p text:style-name="Codigo">                'view_mode': 'form',</text:p>
      <text:p text:style-name="Codigo">                'res_model': 'account.move',</text:p>
      <text:p text:style-name="Codigo">                'view_id': self.env.ref(</text:p>
      <text:p text:style-name="Codigo">                    'klo_account_invoice_uva.view_move_form_uva'</text:p>
      <text:p text:style-name="Codigo">                ).id,</text:p>
      <text:p text:style-name="Codigo">                'context': self._get_move_action_context(),</text:p>
      <text:p text:style-name="Codigo">            }</text:p>
      <text:p text:style-name="Codigo">        return super().action_create_new()</text:p>
      <text:p text:style-name="Normal"> </text:p>
      <text:p text:style-name="H3">Fichero: views/account_journal_views.xml</text:p>
      <text:p text:style-name="Codigo">&lt;record id="view_account_journal_form_uva" model="ir.ui.view"&gt;</text:p>
      <text:p text:style-name="Codigo">    &lt;field name="name"&gt;account.journal.form.uva&lt;/field&gt;</text:p>
      <text:p text:style-name="Codigo">    &lt;field name="model"&gt;account.journal&lt;/field&gt;</text:p>
      <text:p text:style-name="Codigo">    &lt;field name="inherit_id" ref="account.view_account_journal_form"/&gt;</text:p>
      <text:p text:style-name="Codigo">    &lt;field name="arch" type="xml"&gt;</text:p>
      <text:p text:style-name="Codigo">        &lt;xpath expr="//field[@name='type']" position="after"&gt;</text:p>
      <text:p text:style-name="Codigo">            &lt;field name="es_para_uva"</text:p>
      <text:p text:style-name="Codigo">                   attrs="{'invisible': [('type', '!=', 'sale')]}"</text:p>
      <text:p text:style-name="Codigo">                   widget="boolean_toggle"/&gt;</text:p>
      <text:p text:style-name="Codigo">        &lt;/xpath&gt;</text:p>
      <text:p text:style-name="Codigo">    &lt;/field&gt;</text:p>
      <text:p text:style-name="Codigo">&lt;/record&gt;</text:p>
      <text:p text:style-name="Normal"> </text:p>
      <text:p text:style-name="H3">Fichero: views/account_move_uva_views.xml (vista primaria para uva)</text:p>
      <text:p text:style-name="Codigo">&lt;record id="view_move_form_uva" model="ir.ui.view"&gt;</text:p>
      <text:p text:style-name="Codigo">    &lt;field name="name"&gt;klo.account.move.form.uva&lt;/field&gt;</text:p>
      <text:p text:style-name="Codigo">    &lt;field name="model"&gt;account.move&lt;/field&gt;</text:p>
      <text:p text:style-name="Codigo">    &lt;field name="inherit_id" ref="account.view_move_form"/&gt;</text:p>
      <text:p text:style-name="Codigo">    &lt;field name="mode"&gt;primary&lt;/field&gt;</text:p>
      <text:p text:style-name="Codigo">    &lt;field name="arch" type="xml"&gt;</text:p>
      <text:p text:style-name="Codigo">        &lt;!-- Etiqueta → oculta --&gt;</text:p>
      <text:p text:style-name="Codigo">        &lt;xpath expr="//field[@name='invoice_line_ids']//tree//field[@name='name']</text:p>
      <text:p text:style-name="Codigo">                     [@widget='section_and_note_text']" position="attributes"&gt;</text:p>
      <text:p text:style-name="Codigo">            &lt;attribute name="optional"&gt;hide&lt;/attribute&gt;</text:p>
      <text:p text:style-name="Codigo">        &lt;/xpath&gt;</text:p>
      <text:p text:style-name="Codigo">        &lt;!-- Cuenta → oculta --&gt;</text:p>
      <text:p text:style-name="Codigo">        &lt;xpath expr="//field[@name='invoice_line_ids']//tree//field[@name='account_id']"</text:p>
      <text:p text:style-name="Codigo">               position="attributes"&gt;</text:p>
      <text:p text:style-name="Codigo">            &lt;attribute name="optional"&gt;hide&lt;/attribute&gt;</text:p>
      <text:p text:style-name="Codigo">        &lt;/xpath&gt;</text:p>
      <text:p text:style-name="Codigo">        &lt;!-- Cantidad → oculta --&gt;</text:p>
      <text:p text:style-name="Codigo">        &lt;xpath expr="//field[@name='invoice_line_ids']//tree//field[@name='quantity'][@optional]"</text:p>
      <text:p text:style-name="Codigo">               position="attributes"&gt;</text:p>
      <text:p text:style-name="Codigo">            &lt;attribute name="optional"&gt;hide&lt;/attribute&gt;</text:p>
      <text:p text:style-name="Codigo">        &lt;/xpath&gt;</text:p>
      <text:p text:style-name="Codigo">        &lt;!-- Nuevas columnas UVA antes de price_unit --&gt;</text:p>
      <text:p text:style-name="Codigo">        &lt;xpath expr="//field[@name='invoice_line_ids']//tree//field[@name='price_unit']"</text:p>
      <text:p text:style-name="Codigo">               position="before"&gt;</text:p>
      <text:p text:style-name="Codigo">            &lt;field name="grado"       string="Grado"        optional="show"/&gt;</text:p>
      <text:p text:style-name="Codigo">            &lt;field name="kilos"       string="Kilos"        optional="show"/&gt;</text:p>
      <text:p text:style-name="Codigo">            &lt;field name="precio_kilogrado" string="€/kilogrado" optional="show"/&gt;</text:p>
      <text:p text:style-name="Codigo">            &lt;field name="kilogrados"  string="Kilogrados"   optional="show"/&gt;</text:p>
      <text:p text:style-name="Codigo">        &lt;/xpath&gt;</text:p>
      <text:p text:style-name="Codigo">        &lt;!-- price_unit renombrado a Importe --&gt;</text:p>
      <text:p text:style-name="Codigo">        &lt;xpath expr="//field[@name='invoice_line_ids']//tree//field[@name='price_unit']"</text:p>
      <text:p text:style-name="Codigo">               position="attributes"&gt;</text:p>
      <text:p text:style-name="Codigo">            &lt;attribute name="string"&gt;Importe&lt;/attribute&gt;</text:p>
      <text:p text:style-name="Codigo">        &lt;/xpath&gt;</text:p>
      <text:p text:style-name="Codigo">        &lt;!-- Impuestos → ocultos --&gt;</text:p>
      <text:p text:style-name="Codigo">        &lt;xpath expr="//field[@name='invoice_line_ids']//tree//field[@name='tax_ids']</text:p>
      <text:p text:style-name="Codigo">                     [@widget='many2many_tags']" position="attributes"&gt;</text:p>
      <text:p text:style-name="Codigo">            &lt;attribute name="optional"&gt;hide&lt;/attribute&gt;</text:p>
      <text:p text:style-name="Codigo">        &lt;/xpath&gt;</text:p>
      <text:p text:style-name="Codigo">    &lt;/field&gt;</text:p>
      <text:p text:style-name="Codigo">&lt;/record&gt;</text:p>
      <text:p text:style-name="Separador"> </text:p>
      <text:p text:style-name="H2">PETICIÓN 3 — Informe QWeb heredado para facturas de uva</text:p>
      <text:p text:style-name="Separador"> </text:p>
      <text:p text:style-name="Peticion">👤 USUARIO: Añadir al módulo un QWeb heredado de account.report_invoice_document que se llame klo_report_invoice_document_uva.</text:p>
      <text:p text:style-name="Peticion">👤 USUARIO: El nuevo QWeb debe incorporar en las líneas de factura las columnas nuevas: Descripción, Grado, Kilos, €/Kilogrado, Kilogrados, Importe.</text:p>
      <text:p text:style-name="Normal"> </text:p>
      <text:p text:style-name="Respuesta">🤖 IA: Se creó report/report_invoice_uva.xml con un template primary heredando de account.report_invoice_document.</text:p>
      <text:p text:style-name="Respuesta">🤖 IA: Se creó views/report_invoice_uva_wrappers.xml para integrar el template en los wrappers account.report_invoice y account.report_invoice_with_payments usando t-elif para no romper el flujo estándar.</text:p>
      <text:p text:style-name="Normal"> </text:p>
      <text:p text:style-name="H3">Fichero: report/report_invoice_uva.xml</text:p>
      <text:p text:style-name="Codigo">&lt;template id="klo_report_invoice_document_uva"</text:p>
      <text:p text:style-name="Codigo">          inherit_id="account.report_invoice_document"</text:p>
      <text:p text:style-name="Codigo">          primary="True"&gt;</text:p>
      <text:p text:style-name="Codigo">    &lt;!-- Cabecera Quantity → cuatro columnas UVA --&gt;</text:p>
      <text:p text:style-name="Codigo">    &lt;xpath expr="//th[@name='th_quantity']" position="replace"&gt;</text:p>
      <text:p text:style-name="Codigo">        &lt;th name="th_grado"             class="text-end"&gt;&lt;span&gt;Grado (°)&lt;/span&gt;&lt;/th&gt;</text:p>
      <text:p text:style-name="Codigo">        &lt;th name="th_kilos"             class="text-end"&gt;&lt;span&gt;Kilos&lt;/span&gt;&lt;/th&gt;</text:p>
      <text:p text:style-name="Codigo">        &lt;th name="th_precio_kilogrado"  class="text-end"&gt;&lt;span&gt;€/Kilogrado&lt;/span&gt;&lt;/th&gt;</text:p>
      <text:p text:style-name="Codigo">        &lt;th name="th_kilogrados"        class="text-end"&gt;&lt;span&gt;Kilogrados&lt;/span&gt;&lt;/th&gt;</text:p>
      <text:p text:style-name="Codigo">    &lt;/xpath&gt;</text:p>
      <text:p text:style-name="Codigo">    &lt;!-- "Unit Price" → "Importe" --&gt;</text:p>
      <text:p text:style-name="Codigo">    &lt;xpath expr="//th[@name='th_priceunit']/span" position="replace"&gt;</text:p>
      <text:p text:style-name="Codigo">        &lt;span&gt;Importe&lt;/span&gt;</text:p>
      <text:p text:style-name="Codigo">    &lt;/xpath&gt;</text:p>
      <text:p text:style-name="Codigo">    &lt;!-- Celda de línea productiva reemplazada para mostrar campos UVA --&gt;</text:p>
      <text:p text:style-name="Codigo">    &lt;xpath expr="//t[@name='account_invoice_line_accountable']" position="replace"&gt;</text:p>
      <text:p text:style-name="Codigo">        &lt;t t-if="line.display_type == 'product'" name="account_invoice_line_accountable"&gt;</text:p>
      <text:p text:style-name="Codigo">            &lt;td name="account_invoice_line_name"&gt;</text:p>
      <text:p text:style-name="Codigo">                &lt;span t-field="line.name" t-options="{'widget': 'text'}"/&gt;</text:p>
      <text:p text:style-name="Codigo">            &lt;/td&gt;</text:p>
      <text:p text:style-name="Codigo">            &lt;td class="text-end"&gt;&lt;span t-field="line.grado"/&gt;&lt;/td&gt;</text:p>
      <text:p text:style-name="Codigo">            &lt;td class="text-end"&gt;&lt;span t-field="line.kilos"/&gt;&lt;/td&gt;</text:p>
      <text:p text:style-name="Codigo">            &lt;td class="text-end"&gt;&lt;span t-field="line.precio_kilogrado"/&gt;&lt;/td&gt;</text:p>
      <text:p text:style-name="Codigo">            &lt;td class="text-end"&gt;&lt;span t-field="line.kilogrados"/&gt;&lt;/td&gt;</text:p>
      <text:p text:style-name="Codigo">            &lt;td class="text-end o_price_total"&gt;</text:p>
      <text:p text:style-name="Codigo">                &lt;span t-field="line.price_subtotal"</text:p>
      <text:p text:style-name="Codigo">                      groups="account.group_show_line_subtotals_tax_excluded"/&gt;</text:p>
      <text:p text:style-name="Codigo">                &lt;span t-field="line.price_total"</text:p>
      <text:p text:style-name="Codigo">                      groups="account.group_show_line_subtotals_tax_included"/&gt;</text:p>
      <text:p text:style-name="Codigo">            &lt;/td&gt;</text:p>
      <text:p text:style-name="Codigo">        &lt;/t&gt;</text:p>
      <text:p text:style-name="Codigo">    &lt;/xpath&gt;</text:p>
      <text:p text:style-name="Codigo">&lt;/template&gt;</text:p>
      <text:p text:style-name="Normal"> </text:p>
      <text:p text:style-name="H3">Fichero: views/report_invoice_uva_wrappers.xml</text:p>
      <text:p text:style-name="Codigo">&lt;template id="klo_inherit_report_invoice"</text:p>
      <text:p text:style-name="Codigo">          inherit_id="account.report_invoice"&gt;</text:p>
      <text:p text:style-name="Codigo">    &lt;xpath expr="//t[@t-if]" position="after"&gt;</text:p>
      <text:p text:style-name="Codigo">        &lt;t t-elif="o._get_name_invoice_report() ==</text:p>
      <text:p text:style-name="Codigo">                   'klo_account_invoice_uva.klo_report_invoice_document_uva'"</text:p>
      <text:p text:style-name="Codigo">           t-call="klo_account_invoice_uva.klo_report_invoice_document_uva"</text:p>
      <text:p text:style-name="Codigo">           t-lang="lang"/&gt;</text:p>
      <text:p text:style-name="Codigo">    &lt;/xpath&gt;</text:p>
      <text:p text:style-name="Codigo">&lt;/template&gt;</text:p>
      <text:p text:style-name="Codigo">&lt;template id="klo_inherit_report_invoice_with_payments"</text:p>
      <text:p text:style-name="Codigo">          inherit_id="account.report_invoice_with_payments"&gt;</text:p>
      <text:p text:style-name="Codigo">    &lt;xpath expr="//t[@t-if]" position="after"&gt;</text:p>
      <text:p text:style-name="Codigo">        &lt;t t-elif="o._get_name_invoice_report() ==</text:p>
      <text:p text:style-name="Codigo">                   'klo_account_invoice_uva.klo_report_invoice_document_uva'"</text:p>
      <text:p text:style-name="Codigo">           t-call="klo_account_invoice_uva.klo_report_invoice_document_uva"</text:p>
      <text:p text:style-name="Codigo">           t-lang="lang"/&gt;</text:p>
      <text:p text:style-name="Codigo">    &lt;/xpath&gt;</text:p>
      <text:p text:style-name="Codigo">&lt;/template&gt;</text:p>
      <text:p text:style-name="Separador"> </text:p>
      <text:p text:style-name="H2">PETICIÓN 4 — Corrección de error de validación XML Schema en report_invoice_uva.xml</text:p>
      <text:p text:style-name="Separador"> </text:p>
      <text:p text:style-name="Error">⚠ ERROR: 2026-03-17 17:51:39 | The XML file 'report/report_invoice_uva.xml' does not fit the required schema!</text:p>
      <text:p text:style-name="Peticion">👤 USUARIO: Realizar ajustes para que el QWeb se ejecute correctamente y solo cuando el diario de la factura tiene es_para_uva a True.</text:p>
      <text:p text:style-name="Normal"> </text:p>
      <text:p text:style-name="Respuesta">🤖 IA: El error se producía por atributos no permitidos en el schema de Odoo 16 dentro del bloque &lt;odoo&gt;/&lt;data&gt;. Se ajustó la estructura del XML: el template QWeb debe ir directamente bajo &lt;odoo&gt; sin &lt;data&gt;, y los registros ir.actions.report sí pueden ir bajo &lt;data&gt;.</text:p>
      <text:p text:style-name="Respuesta">🤖 IA: Se añadió el método _get_name_invoice_report en models/account_move.py para seleccionar el template correcto según el campo es_para_uva del diario.</text:p>
      <text:p text:style-name="Normal"> </text:p>
      <text:p text:style-name="H3">Fichero: models/account_move.py — método _get_name_invoice_report</text:p>
      <text:p text:style-name="Codigo">def _get_name_invoice_report(self):</text:p>
      <text:p text:style-name="Codigo">    """Sobreescribe la selección del template de impresión de factura.</text:p>
      <text:p text:style-name="Codigo">    Si la factura pertenece a un diario marcado como 'Es para uva',</text:p>
      <text:p text:style-name="Codigo">    se usa el template especializado para uva en lugar del estándar.</text:p>
      <text:p text:style-name="Codigo">    """</text:p>
      <text:p text:style-name="Codigo">    self.ensure_one()</text:p>
      <text:p text:style-name="Codigo">    if self.journal_id.es_para_uva:</text:p>
      <text:p text:style-name="Codigo">        return 'klo_account_invoice_uva.klo_report_invoice_document_uva'</text:p>
      <text:p text:style-name="Codigo">    return super()._get_name_invoice_report()</text:p>
      <text:p text:style-name="Separador"> </text:p>
      <text:p text:style-name="H2">PETICIÓN 5 — Abrir vista uva al EDITAR una factura existente</text:p>
      <text:p text:style-name="Separador"> </text:p>
      <text:p text:style-name="Peticion">👤 USUARIO: Cuando se abre una factura (se edita) comprobar si el diario (journal_id) de account.move tiene el campo es_para_uva a True. Si es True, editar la factura con la nueva vista view_move_form_uva.</text:p>
      <text:p text:style-name="Normal"> </text:p>
      <text:p text:style-name="Respuesta">🤖 IA: Se implementó get_formview_id en models/account_move.py para devolver el ID de view_move_form_uva cuando journal_id.es_para_uva es True.</text:p>
      <text:p text:style-name="Normal"> </text:p>
      <text:p text:style-name="H3">Fichero: models/account_move.py — método get_formview_id</text:p>
      <text:p text:style-name="Codigo">def get_formview_id(self, access_uid=None):</text:p>
      <text:p text:style-name="Codigo">    """Devuelve el ID de la vista de formulario a usar al abrir/editar la factura.</text:p>
      <text:p text:style-name="Codigo">    Si el diario tiene 'Es para uva' marcado, se usa la vista especializada.</text:p>
      <text:p text:style-name="Codigo">    """</text:p>
      <text:p text:style-name="Codigo">    self.ensure_one()</text:p>
      <text:p text:style-name="Codigo">    if self.journal_id.es_para_uva:</text:p>
      <text:p text:style-name="Codigo">        return self.env.ref(</text:p>
      <text:p text:style-name="Codigo">            'klo_account_invoice_uva.view_move_form_uva'</text:p>
      <text:p text:style-name="Codigo">        ).id</text:p>
      <text:p text:style-name="Codigo">    return super().get_formview_id(access_uid=access_uid)</text:p>
      <text:p text:style-name="Separador"> </text:p>
      <text:p text:style-name="H2">PETICIÓN 6 — get_formview_id no se ejecutaba desde vistas de lista</text:p>
      <text:p text:style-name="Separador"> </text:p>
      <text:p text:style-name="Peticion">👤 USUARIO: Parece que no está ejecutando get_formview_id de account.move al editar una factura desde la lista. Analiza el código para que al editar una factura, primero compruebe es_para_uva y use view_move_form_uva.</text:p>
      <text:p text:style-name="Normal"> </text:p>
      <text:p text:style-name="Respuesta">🤖 IA: El problema es que la vista de lista (ListController de Odoo 16) llama directamente a openRecord sin pasar por get_formview_id del servidor.</text:p>
      <text:p text:style-name="Respuesta">🤖 IA: SOLUCIÓN: Se creó el fichero static/src/js/account_move_list_open.js con un patch del ListController que intercepta openRecord. Para que el campo es_para_uva esté disponible en el cliente sin llamada extra, se añadió como columna invisible en la vista de lista (view_invoice_tree).</text:p>
      <text:p text:style-name="Normal"> </text:p>
      <text:p text:style-name="H3">Fichero: static/src/js/account_move_list_open.js — patch openRecord</text:p>
      <text:p text:style-name="Codigo">/** @odoo-module **/</text:p>
      <text:p text:style-name="Codigo">import { patch } from "@web/core/utils/patch";</text:p>
      <text:p text:style-name="Codigo">import { ListController } from "@web/views/list/list_controller";</text:p>
      <text:p text:style-name="Codigo"> </text:p>
      <text:p text:style-name="Codigo">patch(ListController.prototype, "klo_account_invoice_uva.list_controller_open_record", {</text:p>
      <text:p text:style-name="Codigo">    async openRecord(record) {</text:p>
      <text:p text:style-name="Codigo">        // Guardar _super ANTES del primer await (los métodos async invalidan _super)</text:p>
      <text:p text:style-name="Codigo">        const superFn = this._super.bind(this);</text:p>
      <text:p text:style-name="Codigo"> </text:p>
      <text:p text:style-name="Codigo">        if (this.props.resModel === "account.move" &amp;&amp; record.data.es_para_uva) {</text:p>
      <text:p text:style-name="Codigo">            const action = await this.orm.call(</text:p>
      <text:p text:style-name="Codigo">                "account.move", "get_formview_action", [[record.resId]],</text:p>
      <text:p text:style-name="Codigo">            );</text:p>
      <text:p text:style-name="Codigo">            const activeIds = this.model.root.records.map((dp) =&gt; dp.resId);</text:p>
      <text:p text:style-name="Codigo">            action.context = {</text:p>
      <text:p text:style-name="Codigo">                ...action.context,</text:p>
      <text:p text:style-name="Codigo">                active_id: record.resId,</text:p>
      <text:p text:style-name="Codigo">                active_ids: activeIds,</text:p>
      <text:p text:style-name="Codigo">                active_model: "account.move",</text:p>
      <text:p text:style-name="Codigo">            };</text:p>
      <text:p text:style-name="Codigo">            return this.actionService.doAction(action);</text:p>
      <text:p text:style-name="Codigo">        }</text:p>
      <text:p text:style-name="Codigo">        return superFn(record);</text:p>
      <text:p text:style-name="Codigo">    },</text:p>
      <text:p text:style-name="Codigo">    // ... createRecord se describe en PETICIÓN 8</text:p>
      <text:p text:style-name="Codigo">});</text:p>
      <text:p text:style-name="Normal"> </text:p>
      <text:p text:style-name="H3">Fichero: views/account_move_uva_views.xml — campo invisible es_para_uva en lista</text:p>
      <text:p text:style-name="Codigo">&lt;record id="view_invoice_list_es_para_uva" model="ir.ui.view"&gt;</text:p>
      <text:p text:style-name="Codigo">    &lt;field name="name"&gt;klo.account.move.list.es_para_uva&lt;/field&gt;</text:p>
      <text:p text:style-name="Codigo">    &lt;field name="model"&gt;account.move&lt;/field&gt;</text:p>
      <text:p text:style-name="Codigo">    &lt;field name="inherit_id" ref="account.view_invoice_tree"/&gt;</text:p>
      <text:p text:style-name="Codigo">    &lt;field name="arch" type="xml"&gt;</text:p>
      <text:p text:style-name="Codigo">        &lt;xpath expr="//field[@name='move_type']" position="after"&gt;</text:p>
      <text:p text:style-name="Codigo">            &lt;field name="es_para_uva" invisible="1"/&gt;</text:p>
      <text:p text:style-name="Codigo">        &lt;/xpath&gt;</text:p>
      <text:p text:style-name="Codigo">    &lt;/field&gt;</text:p>
      <text:p text:style-name="Codigo">&lt;/record&gt;</text:p>
      <text:p text:style-name="Normal"> </text:p>
      <text:p text:style-name="H3">Fichero: models/account_move.py — campo related es_para_uva (store=True)</text:p>
      <text:p text:style-name="Codigo">es_para_uva = fields.Boolean(</text:p>
      <text:p text:style-name="Codigo">    string='Es factura de uva',</text:p>
      <text:p text:style-name="Codigo">    related='journal_id.es_para_uva',</text:p>
      <text:p text:style-name="Codigo">    store=True,</text:p>
      <text:p text:style-name="Codigo">    readonly=True,</text:p>
      <text:p text:style-name="Codigo">)</text:p>
      <text:p text:style-name="Separador"> </text:p>
      <text:p text:style-name="H2">PETICIÓN 7 — Error: métodos privados no pueden llamarse remotamente</text:p>
      <text:p text:style-name="Separador"> </text:p>
      <text:p text:style-name="Error">⚠ ERROR: Private methods (such as 'account.move._get_uva_formview_id_for_new') cannot be called remotely.</text:p>
      <text:p text:style-name="Peticion">👤 USUARIO: Al crear una nueva factura salta el error de acceso para métodos privados.</text:p>
      <text:p text:style-name="Normal"> </text:p>
      <text:p text:style-name="Respuesta">🤖 IA: Se renombró el método _get_uva_formview_id_for_new (privado, con guión bajo) a get_uva_formview_id_for_new (público, sin guión bajo) en models/account_move.py y se actualizó la llamada correspondiente en el fichero JavaScript.</text:p>
      <text:p text:style-name="Separador"> </text:p>
      <text:p text:style-name="H2">PETICIÓN 8 — Error: this._super is not a function en createRecord</text:p>
      <text:p text:style-name="Separador"> </text:p>
      <text:p text:style-name="Error">⚠ ERROR: UncaughtPromiseError &gt; TypeError: this._super is not a function | TypeError: this._super is not a function at createRecord (account_move_list_open.js)</text:p>
      <text:p text:style-name="Peticion">👤 USUARIO: Al crear nueva factura, si el diario tiene es_para_uva a True, salta el error this._super is not a function.</text:p>
      <text:p text:style-name="Normal"> </text:p>
      <text:p text:style-name="Respuesta">🤖 IA: El mecanismo de patch de Odoo 16 configura this._super de forma SÍNCRONA y lo restaura inmediatamente tras el retorno de la función parcheada. En funciones async, el retorno es una Promise, por lo que _super se restaura ANTES de que el código async termine.</text:p>
      <text:p text:style-name="Respuesta">🤖 IA: SOLUCIÓN: Guardar this._super en una variable local ANTES del primer await, tanto en openRecord como en createRecord:</text:p>
      <text:p text:style-name="Normal"> </text:p>
      <text:p text:style-name="H3">Fichero: static/src/js/account_move_list_open.js — patch createRecord (completo)</text:p>
      <text:p text:style-name="Codigo">async createRecord() {</text:p>
      <text:p text:style-name="Codigo">    // ⚠ CRÍTICO: guardar _super ANTES del primer await</text:p>
      <text:p text:style-name="Codigo">    const superFn = this._super.bind(this);</text:p>
      <text:p text:style-name="Codigo"> </text:p>
      <text:p text:style-name="Codigo">    if (this.props.resModel === "account.move") {</text:p>
      <text:p text:style-name="Codigo">        const viewId = await this.orm.call(</text:p>
      <text:p text:style-name="Codigo">            "account.move",</text:p>
      <text:p text:style-name="Codigo">            "get_uva_formview_id_for_new",</text:p>
      <text:p text:style-name="Codigo">            [],</text:p>
      <text:p text:style-name="Codigo">            { context: this.props.context },</text:p>
      <text:p text:style-name="Codigo">        );</text:p>
      <text:p text:style-name="Codigo">        if (viewId) {</text:p>
      <text:p text:style-name="Codigo">            return this.actionService.doAction({</text:p>
      <text:p text:style-name="Codigo">                type: "ir.actions.act_window",</text:p>
      <text:p text:style-name="Codigo">                res_model: "account.move",</text:p>
      <text:p text:style-name="Codigo">                view_mode: "form",</text:p>
      <text:p text:style-name="Codigo">                views: [[viewId, "form"]],</text:p>
      <text:p text:style-name="Codigo">                target: "current",</text:p>
      <text:p text:style-name="Codigo">                context: this.props.context,</text:p>
      <text:p text:style-name="Codigo">            });</text:p>
      <text:p text:style-name="Codigo">        }</text:p>
      <text:p text:style-name="Codigo">    }</text:p>
      <text:p text:style-name="Codigo">    return superFn();</text:p>
      <text:p text:style-name="Codigo">},</text:p>
      <text:p text:style-name="Normal"> </text:p>
      <text:p text:style-name="H3">Fichero: models/account_move.py — método get_uva_formview_id_for_new</text:p>
      <text:p text:style-name="Codigo">@api.model</text:p>
      <text:p text:style-name="Codigo">def get_uva_formview_id_for_new(self):</text:p>
      <text:p text:style-name="Codigo">    """Comprueba si el diario predeterminado tiene es_para_uva.</text:p>
      <text:p text:style-name="Codigo">    Devuelve el ID de view_move_form_uva si corresponde, False en caso contrario.</text:p>
      <text:p text:style-name="Codigo">    Lógica de resolución del diario (misma prioridad que Odoo):</text:p>
      <text:p text:style-name="Codigo">      1. default_journal_id en el contexto → verificación directa.</text:p>
      <text:p text:style-name="Codigo">      2. Sin diario explícito → se busca el primer diario del tipo correspondiente.</text:p>
      <text:p text:style-name="Codigo">    """</text:p>
      <text:p text:style-name="Codigo">    journal_id = self._context.get('default_journal_id')</text:p>
      <text:p text:style-name="Codigo">    if journal_id:</text:p>
      <text:p text:style-name="Codigo">        journal = self.env['account.journal'].browse(journal_id)</text:p>
      <text:p text:style-name="Codigo">        if journal.es_para_uva:</text:p>
      <text:p text:style-name="Codigo">            return self.env.ref('klo_account_invoice_uva.view_move_form_uva').id</text:p>
      <text:p text:style-name="Codigo">        return False</text:p>
      <text:p text:style-name="Codigo"> </text:p>
      <text:p text:style-name="Codigo">    move_type = self._context.get('default_move_type', 'entry')</text:p>
      <text:p text:style-name="Codigo">    if move_type in ('out_invoice', 'out_refund', 'out_receipt'):</text:p>
      <text:p text:style-name="Codigo">        journal_types = ['sale']</text:p>
      <text:p text:style-name="Codigo">    elif move_type in ('in_invoice', 'in_refund', 'in_receipt'):</text:p>
      <text:p text:style-name="Codigo">        journal_types = ['purchase']</text:p>
      <text:p text:style-name="Codigo">    else:</text:p>
      <text:p text:style-name="Codigo">        return False</text:p>
      <text:p text:style-name="Codigo"> </text:p>
      <text:p text:style-name="Codigo">    company_id = self.env.company.id</text:p>
      <text:p text:style-name="Codigo">    journal = self.env['account.journal'].search(</text:p>
      <text:p text:style-name="Codigo">        [('company_id', '=', company_id), ('type', 'in', journal_types)],</text:p>
      <text:p text:style-name="Codigo">        limit=1,</text:p>
      <text:p text:style-name="Codigo">    )</text:p>
      <text:p text:style-name="Codigo">    if journal and journal.es_para_uva:</text:p>
      <text:p text:style-name="Codigo">        return self.env.ref('klo_account_invoice_uva.view_move_form_uva').id</text:p>
      <text:p text:style-name="Codigo">    return False</text:p>
      <text:p text:style-name="Separador"> </text:p>
      <text:p text:style-name="H2">PETICIÓN 9 — Modificar .gitignore para excluir ficheros __pycache__</text:p>
      <text:p text:style-name="Separador"> </text:p>
      <text:p text:style-name="Peticion">👤 USUARIO: Modificar el fichero .gitignore para que excluya ficheros del tipo: klo_contract_line_menu/__pycache__/__init__.cpython-310.pyc</text:p>
      <text:p text:style-name="Normal"> </text:p>
      <text:p text:style-name="Respuesta">🤖 IA: Se añadieron al .gitignore del repositorio las entradas estándar para excluir directorios __pycache__ y ficheros .pyc compilados de Python:</text:p>
      <text:p text:style-name="Normal"> </text:p>
      <text:p text:style-name="Codigo"># Python bytecode / caché del intérprete</text:p>
      <text:p text:style-name="Codigo">__pycache__/</text:p>
      <text:p text:style-name="Codigo">*.py[cod]</text:p>
      <text:p text:style-name="Codigo">*$py.class</text:p>
      <text:p text:style-name="Codigo">*.pyc</text:p>
      <text:p text:style-name="Codigo">*.pyo</text:p>
      <text:p text:style-name="Separador"> </text:p>
      <text:p text:style-name="H1">3. ESTRUCTURA FINAL DEL MÓDULO</text:p>
      <text:p text:style-name="Normal"> </text:p>
      <text:p text:style-name="Normal">Árbol de ficheros del módulo klo_account_invoice_uva:</text:p>
      <text:p text:style-name="Normal"> </text:p>
      <text:p text:style-name="Codigo">klo_account_invoice_uva/</text:p>
      <text:p text:style-name="Codigo">├── __init__.py</text:p>
      <text:p text:style-name="Codigo">├── __manifest__.py</text:p>
      <text:p text:style-name="Codigo">├── models/</text:p>
      <text:p text:style-name="Codigo">│   ├── __init__.py</text:p>
      <text:p text:style-name="Codigo">│   ├── account_journal.py          # Campo es_para_uva + override action_create_new</text:p>
      <text:p text:style-name="Codigo">│   ├── account_move.py             # es_para_uva (related), get_formview_id,</text:p>
      <text:p text:style-name="Codigo">│   │                               # _get_name_invoice_report, get_uva_formview_id_for_new</text:p>
      <text:p text:style-name="Codigo">│   └── account_move_line.py        # Campos grado, kilos, precio_kilogrado, kilogrados</text:p>
      <text:p text:style-name="Codigo">├── views/</text:p>
      <text:p text:style-name="Codigo">│   ├── account_journal_views.xml   # Campo es_para_uva en formulario de diario</text:p>
      <text:p text:style-name="Codigo">│   ├── account_move_uva_views.xml  # view_move_form_uva (primary) + invisible en lista</text:p>
      <text:p text:style-name="Codigo">│   └── report_invoice_uva_wrappers.xml  # Integración QWeb en wrappers estándar</text:p>
      <text:p text:style-name="Codigo">├── report/</text:p>
      <text:p text:style-name="Codigo">│   └── report_invoice_uva.xml      # Template QWeb klo_report_invoice_document_uva</text:p>
      <text:p text:style-name="Codigo">└── static/</text:p>
      <text:p text:style-name="Codigo">    └── src/</text:p>
      <text:p text:style-name="Codigo">        └── js/</text:p>
      <text:p text:style-name="Codigo">            └── account_move_list_open.js  # Patch ListController openRecord/createRecord</text:p>
      <text:p text:style-name="Separador"> </text:p>
      <text:p text:style-name="H1">4. REGLAS CLAVE PARA REPLICAR EL MÓDULO SIN ERRORES</text:p>
      <text:p text:style-name="Normal"> </text:p>
      <text:p text:style-name="H2">4.1 Sobre Python / ORM</text:p>
      <text:p text:style-name="Normal">• El campo es_para_uva en account.move debe ser related='journal_id.es_para_uva' con store=True para que esté disponible en vistas de lista.</text:p>
      <text:p text:style-name="Normal">• get_uva_formview_id_for_new debe ser un método PÚBLICO (@api.model sin guión bajo inicial) para poder ser llamado desde JavaScript via this.orm.call.</text:p>
      <text:p text:style-name="Normal">• get_formview_id requiere self.ensure_one() porque trabaja con un único registro.</text:p>
      <text:p text:style-name="Normal"> </text:p>
      <text:p text:style-name="H2">4.2 Sobre vistas XML</text:p>
      <text:p text:style-name="Normal">• La vista view_move_form_uva debe tener mode='primary' para ser independiente de la vista estándar y no alterar el formulario general de facturas.</text:p>
      <text:p text:style-name="Normal">• Los templates QWeb deben ir directamente bajo &lt;odoo&gt; (sin &lt;data&gt;) para pasar la validación del schema de Odoo 16.</text:p>
      <text:p text:style-name="Normal">• El campo es_para_uva debe añadirse como invisible='1' en view_invoice_tree para que el cliente JS lo tenga disponible en record.data sin llamada extra.</text:p>
      <text:p text:style-name="Normal"> </text:p>
      <text:p text:style-name="H2">4.3 Sobre JavaScript / Patch de Odoo 16</text:p>
      <text:p text:style-name="Normal">• En métodos async parcheados con patch(), this._super se restaura síncronamente justo después del primer retorno de la función (que en async es una Promise).</text:p>
      <text:p text:style-name="Normal">• SIEMPRE guardar const superFn = this._super.bind(this) ANTES del primer await.</text:p>
      <text:p text:style-name="Normal">• El patch se registra en web.assets_backend en __manifest__.py.</text:p>
      <text:p text:style-name="Normal"> </text:p>
      <text:p text:style-name="H2">4.4 Orden de carga en __manifest__.py</text:p>
      <text:p text:style-name="Codigo">'data': [</text:p>
      <text:p text:style-name="Codigo">    'views/account_journal_views.xml',       # 1. Campos en diario</text:p>
      <text:p text:style-name="Codigo">    'views/account_move_uva_views.xml',      # 2. Vista primaria + lista</text:p>
      <text:p text:style-name="Codigo">    'report/report_invoice_uva.xml',         # 3. Template QWeb (sin &lt;data&gt;)</text:p>
      <text:p text:style-name="Codigo">    'views/report_invoice_uva_wrappers.xml', # 4. Wrappers de impresión</text:p>
      <text:p text:style-name="Codigo">],</text:p>
      <text:p text:style-name="Codigo">'assets': {</text:p>
      <text:p text:style-name="Codigo">    'web.assets_backend': [</text:p>
      <text:p text:style-name="Codigo">        'klo_account_invoice_uva/static/src/js/account_move_list_open.js',</text:p>
      <text:p text:style-name="Codigo">    ],</text:p>
      <text:p text:style-name="Codigo">},</text:p>
      <text:p text:style-name="Separador"> </text:p>
      <text:p text:style-name="H1">5. FÓRMULAS DE CÁLCULO</text:p>
      <text:p text:style-name="Normal"> </text:p>
      <text:p text:style-name="Normal">Kilogrados = Kilos × Grado</text:p>
      <text:p text:style-name="Normal">   → Se recalcula en @api.onchange('kilos', 'grado') → _onchange_kilos_grado_uva</text:p>
      <text:p text:style-name="Normal"> </text:p>
      <text:p text:style-name="Normal">Importe (price_unit) = €/Kilogrado × Kilogrados × 1.000</text:p>
      <text:p text:style-name="Normal">   → Se recalcula en @api.onchange('kilos', 'grado') y</text:p>
      <text:p text:style-name="Normal">     @api.onchange('precio_kilogrado', 'kilogrados') → _onchange_importe_uva</text:p>
      <text:p text:style-name="Separador"> </text:p>
      <text:p text:style-name="H1">6. DEPENDENCIAS</text:p>
      <text:p text:style-name="Normal"> </text:p>
      <text:p text:style-name="Normal">Odoo: versión 16.0</text:p>
      <text:p text:style-name="Normal">Módulo base Odoo: account</text:p>
      <text:p text:style-name="Normal">Python: odfpy (solo para generar este documento, no es dependencia del módulo)</text:p>
      <text:p text:style-name="Normal">Licencia del módulo: LGPL-3</text:p>
      <text:p text:style-name="Normal">Autor: Manuel Calomarde Gomez — KLO Ingenieria Informatica S.L.L.</text:p>
      <text:p text:style-name="Separador"> 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